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tkimg1.png" manifest:media-type="image/png"/>
</manifest:manifest>
</file>

<file path=content.xml><?xml version="1.0" encoding="utf-8"?>
<office:document-content xmlns:office="urn:oasis:names:tc:opendocument:xmlns:office:1.0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svg="urn:oasis:names:tc:opendocument:xmlns:svg-compatible:1.0" xmlns:xlink="http://www.w3.org/1999/xlink" office:version="1.3">
  <office:body>
    <office:text>
      <text:h text:style-name="Heading_1" text:outline-level="1">Widget-Export</text:h>
      <text:p text:style-name="Body">Ein <text:span text:style-name="Bold">fett</text:span> und <text:span text:style-name="Italic">kursiv</text:span> Absatz mit <text:span text:style-name="Mono">code()</text:span>.</text:p>
      <text:h text:style-name="Heading_2" text:outline-level="2">Code</text:h>
      <text:p text:style-name="Code">zeile1<text:line-break/>zeile2</text:p>
      <text:p><draw:frame draw:name="img" text:anchor-type="as-char" svg:width="0.85cm" svg:height="0.42cm"><draw:image xlink:href="Pictures/tkimg1.png" xlink:type="simple" xlink:show="embed" xlink:actuate="onLoad"/></draw:frame></text:p>
      <text:p text:style-name="Body">Schl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xmlns:svg="urn:oasis:names:tc:opendocument:xmlns:svg-compatible:1.0" office:version="1.3">
  <office:styles>
    <style:style style:name="Heading_1" style:family="paragraph">
      <style:paragraph-properties fo:margin-top="0.20in" fo:margin-bottom="0.06in" fo:keep-with-next="always"/>
      <style:text-properties fo:font-weight="bold" fo:font-size="20pt" fo:color="#1a1a2e"/>
    </style:style>
    <style:style style:name="Heading_2" style:family="paragraph">
      <style:paragraph-properties fo:margin-top="0.20in" fo:margin-bottom="0.06in" fo:keep-with-next="always"/>
      <style:text-properties fo:font-weight="bold" fo:font-size="16pt" fo:color="#1a1a2e"/>
    </style:style>
    <style:style style:name="Heading_3" style:family="paragraph">
      <style:paragraph-properties fo:margin-top="0.20in" fo:margin-bottom="0.06in" fo:keep-with-next="always"/>
      <style:text-properties fo:font-weight="bold" fo:font-size="14pt" fo:color="#1a1a2e"/>
    </style:style>
    <style:style style:name="Heading_4" style:family="paragraph">
      <style:paragraph-properties fo:margin-top="0.20in" fo:margin-bottom="0.06in" fo:keep-with-next="always"/>
      <style:text-properties fo:font-weight="bold" fo:font-size="13pt" fo:color="#1a1a2e"/>
    </style:style>
    <style:style style:name="Heading_5" style:family="paragraph">
      <style:paragraph-properties fo:margin-top="0.20in" fo:margin-bottom="0.06in" fo:keep-with-next="always"/>
      <style:text-properties fo:font-weight="bold" fo:font-size="12pt" fo:color="#1a1a2e"/>
    </style:style>
    <style:style style:name="Heading_6" style:family="paragraph">
      <style:paragraph-properties fo:margin-top="0.20in" fo:margin-bottom="0.06in" fo:keep-with-next="always"/>
      <style:text-properties fo:font-weight="bold" fo:font-size="11pt" fo:color="#1a1a2e"/>
    </style:style>
    <style:style style:name="Body" style:family="paragraph">
      <style:paragraph-properties fo:margin-bottom="0.09in" fo:line-height="118%"/>
    </style:style>
    <style:style style:name="Code" style:family="paragraph">
      <style:paragraph-properties fo:background-color="#f4f4f4" fo:margin-left="0.25in" fo:margin-top="0.04in" fo:margin-bottom="0.09in" fo:padding="0.05in"/>
      <style:text-properties fo:font-family="Courier New" fo:font-size="9.5pt"/>
    </style:style>
    <style:style style:name="DefTerm" style:family="paragraph">
      <style:paragraph-properties fo:margin-top="0.13in" fo:margin-bottom="0.02in" fo:keep-with-next="always"/>
      <style:text-properties fo:font-weight="bold"/>
    </style:style>
    <style:style style:name="DefBody" style:family="paragraph">
      <style:paragraph-properties fo:margin-left="0.32in" fo:margin-bottom="0.07in"/>
    </style:style>
    <style:style style:name="ListItem" style:family="paragraph">
      <style:paragraph-properties fo:margin-bottom="0.05in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Mono" style:family="text">
      <style:text-properties fo:font-family="Courier New"/>
    </style:style>
    <style:style style:name="Underline" style:family="text">
      <style:text-properties style:text-underline-style="solid"/>
    </style:style>
    <style:style style:name="Strike" style:family="text">
      <style:text-properties style:text-line-through-style="solid"/>
    </style:style>
    <text:list-style style:name="docir_ol">
      <text:list-level-style-number text:level="1" style:num-format="1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a"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a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a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a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a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a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a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a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a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A"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A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A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A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A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A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A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A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A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i">
      <text:list-level-style-number text:level="1" style:num-format="i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i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i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i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i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i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i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ol_I">
      <text:list-level-style-number text:level="1" style:num-format="I" style:num-suffix=".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number>
      <text:list-level-style-number text:level="2" style:num-format="I" style:num-suffix=".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number>
      <text:list-level-style-number text:level="4" style:num-format="I" style:num-suffix=".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number>
      <text:list-level-style-number text:level="5" style:num-format="I" style:num-suffix=".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number>
      <text:list-level-style-number text:level="7" style:num-format="I" style:num-suffix=".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number>
      <text:list-level-style-number text:level="8" style:num-format="I" style:num-suffix=".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number>
      <text:list-level-style-number text:level="10" style:num-format="I" style:num-suffix=".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number>
    </text:list-style>
    <text:list-style style:name="docir_ul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00cm" fo:text-indent="-0.5cm" fo:margin-left="0.500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000cm" fo:text-indent="-0.5cm" fo:margin-left="1.000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00cm" fo:text-indent="-0.5cm" fo:margin-left="1.500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.000cm" fo:text-indent="-0.5cm" fo:margin-left="2.000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00cm" fo:text-indent="-0.5cm" fo:margin-left="2.500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.000cm" fo:text-indent="-0.5cm" fo:margin-left="3.000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00cm" fo:text-indent="-0.5cm" fo:margin-left="3.500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.000cm" fo:text-indent="-0.5cm" fo:margin-left="4.000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00cm" fo:text-indent="-0.5cm" fo:margin-left="4.500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5.000cm" fo:text-indent="-0.5cm" fo:margin-left="5.000cm"/>
        </style:list-level-properties>
      </text:list-level-style-bullet>
    </text:lis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odf-tcl</meta:generator>
  </office:meta>
</office:document-meta>
</file>