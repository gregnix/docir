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test-dot.png" manifest:media-type="image/png"/>
</manifest:manifest>
</file>

<file path=content.xml><?xml version="1.0" encoding="utf-8"?>
<office:document-content xmlns:office="urn:oasis:names:tc:opendocument:xmlns:office:1.0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svg="urn:oasis:names:tc:opendocument:xmlns:svg-compatible:1.0" xmlns:xlink="http://www.w3.org/1999/xlink" office:version="1.3">
  <office:body>
    <office:text>
      <text:h text:style-name="Heading_1" text:outline-level="1">docir::odt Testdokument</text:h>
      <text:p text:style-name="Body">Dies ist ein <text:span text:style-name="Bold">fetter</text:span> und <text:span text:style-name="Italic">kursiver</text:span> Absatz mit <text:a xlink:type="simple" xlink:href="https://www.tcl.tk/">Tcl/Tk-Link</text:a>.</text:p>
      <text:p text:style-name="Body">Linebreak-Test: Zeile 1<text:line-break/>Zeile 2<text:line-break/>Zeile 3</text:p>
      <text:p text:style-name="Code">package require docir::odt<text:line-break/>  set ir {}<text:line-break/>docir::odt::write $ir out.odt</text:p>
      <text:list text:style-name="docir_ul">
        <text:list-item>
          <text:p text:style-name="ListItem">Listeneintrag A</text:p>
        </text:list-item>
        <text:list-item>
          <text:p text:style-name="ListItem">Listeneintrag B</text:p>
        </text:list-item>
        <text:list-item>
          <text:p text:style-name="ListItem"><text:span text:style-name="Bold">Listeneintrag C fett</text:span></text:p>
        </text:list-item>
      </text:list>
      <table:table>
        <table:table-column/>
        <table:table-column/>
        <table:table-column/>
        <table:table-header-rows>
          <table:table-row>
            <table:table-cell>
              <text:p>Name</text:p>
            </table:table-cell>
            <table:table-cell>
              <text:p>Typ</text:p>
            </table:table-cell>
            <table:table-cell>
              <text:p>Notiz</text:p>
            </table:table-cell>
          </table:table-row>
        </table:table-header-rows>
        <table:table-row>
          <table:table-cell>
            <text:p>docir::odt</text:p>
          </table:table-cell>
          <table:table-cell>
            <text:p>Senke</text:p>
          </table:table-cell>
          <table:table-cell>
            <text:p>DocIR nach ODT</text:p>
          </table:table-cell>
        </table:table-row>
        <table:table-row>
          <table:table-cell>
            <text:p>docir::odtSource</text:p>
          </table:table-cell>
          <table:table-cell>
            <text:p>Quelle</text:p>
          </table:table-cell>
          <table:table-cell>
            <text:p>ODT nach DocIR</text:p>
          </table:table-cell>
        </table:table-row>
      </table:table>
      <text:p><draw:frame draw:name="img" text:anchor-type="as-char" svg:width="0.03cm" svg:height="0.03cm"><draw:image xlink:href="Pictures/test-dot.png" xlink:type="simple" xlink:show="embed" xlink:actuate="onLoad"/></draw:frame></text:p>
      <text:h text:style-name="Heading_2" text:outline-level="2">Fazit</text:h>
      <text:p text:style-name="Body">Wenn diese Datei in LibreOffice geoeffnet werden kann, funktioniert die Grundsenk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xmlns:svg="urn:oasis:names:tc:opendocument:xmlns:svg-compatible:1.0" office:version="1.3">
  <office:styles>
    <style:style style:name="Heading_1" style:family="paragraph">
      <style:paragraph-properties fo:margin-top="0.20in" fo:margin-bottom="0.06in" fo:keep-with-next="always"/>
      <style:text-properties fo:font-weight="bold" fo:font-size="20pt" fo:color="#1a1a2e"/>
    </style:style>
    <style:style style:name="Heading_2" style:family="paragraph">
      <style:paragraph-properties fo:margin-top="0.20in" fo:margin-bottom="0.06in" fo:keep-with-next="always"/>
      <style:text-properties fo:font-weight="bold" fo:font-size="16pt" fo:color="#1a1a2e"/>
    </style:style>
    <style:style style:name="Heading_3" style:family="paragraph">
      <style:paragraph-properties fo:margin-top="0.20in" fo:margin-bottom="0.06in" fo:keep-with-next="always"/>
      <style:text-properties fo:font-weight="bold" fo:font-size="14pt" fo:color="#1a1a2e"/>
    </style:style>
    <style:style style:name="Heading_4" style:family="paragraph">
      <style:paragraph-properties fo:margin-top="0.20in" fo:margin-bottom="0.06in" fo:keep-with-next="always"/>
      <style:text-properties fo:font-weight="bold" fo:font-size="13pt" fo:color="#1a1a2e"/>
    </style:style>
    <style:style style:name="Heading_5" style:family="paragraph">
      <style:paragraph-properties fo:margin-top="0.20in" fo:margin-bottom="0.06in" fo:keep-with-next="always"/>
      <style:text-properties fo:font-weight="bold" fo:font-size="12pt" fo:color="#1a1a2e"/>
    </style:style>
    <style:style style:name="Heading_6" style:family="paragraph">
      <style:paragraph-properties fo:margin-top="0.20in" fo:margin-bottom="0.06in" fo:keep-with-next="always"/>
      <style:text-properties fo:font-weight="bold" fo:font-size="11pt" fo:color="#1a1a2e"/>
    </style:style>
    <style:style style:name="Body" style:family="paragraph">
      <style:paragraph-properties fo:margin-bottom="0.09in" fo:line-height="118%"/>
    </style:style>
    <style:style style:name="Code" style:family="paragraph">
      <style:paragraph-properties fo:background-color="#f4f4f4" fo:margin-left="0.25in" fo:margin-top="0.04in" fo:margin-bottom="0.09in" fo:padding="0.05in"/>
      <style:text-properties fo:font-family="Courier New" fo:font-size="9.5pt"/>
    </style:style>
    <style:style style:name="DefTerm" style:family="paragraph">
      <style:paragraph-properties fo:margin-top="0.13in" fo:margin-bottom="0.02in" fo:keep-with-next="always"/>
      <style:text-properties fo:font-weight="bold"/>
    </style:style>
    <style:style style:name="DefBody" style:family="paragraph">
      <style:paragraph-properties fo:margin-left="0.32in" fo:margin-bottom="0.07in"/>
    </style:style>
    <style:style style:name="ListItem" style:family="paragraph">
      <style:paragraph-properties fo:margin-bottom="0.05in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Mono" style:family="text">
      <style:text-properties fo:font-family="Courier New"/>
    </style:style>
    <style:style style:name="Underline" style:family="text">
      <style:text-properties style:text-underline-style="solid"/>
    </style:style>
    <style:style style:name="Strike" style:family="text">
      <style:text-properties style:text-line-through-style="solid"/>
    </style:style>
    <text:list-style style:name="docir_ol">
      <text:list-level-style-number text:level="1" style:num-format="1" style:num-suffix=".">
        <style:list-level-properties text:list-level-position-and-space-mode="label-alignment">
          <style:list-level-label-alignment text:label-followed-by="listtab" text:list-tab-stop-position="0.500cm" fo:text-indent="-0.5cm" fo:margin-left="0.500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abel-followed-by="listtab" text:list-tab-stop-position="1.000cm" fo:text-indent="-0.5cm" fo:margin-left="1.000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abel-followed-by="listtab" text:list-tab-stop-position="1.500cm" fo:text-indent="-0.5cm" fo:margin-left="1.500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abel-followed-by="listtab" text:list-tab-stop-position="2.000cm" fo:text-indent="-0.5cm" fo:margin-left="2.000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abel-followed-by="listtab" text:list-tab-stop-position="2.500cm" fo:text-indent="-0.5cm" fo:margin-left="2.500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abel-followed-by="listtab" text:list-tab-stop-position="3.000cm" fo:text-indent="-0.5cm" fo:margin-left="3.000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abel-followed-by="listtab" text:list-tab-stop-position="3.500cm" fo:text-indent="-0.5cm" fo:margin-left="3.500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abel-followed-by="listtab" text:list-tab-stop-position="4.000cm" fo:text-indent="-0.5cm" fo:margin-left="4.000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abel-followed-by="listtab" text:list-tab-stop-position="4.500cm" fo:text-indent="-0.5cm" fo:margin-left="4.500cm"/>
        </style:list-level-properties>
      </text:list-level-style-number>
      <text:list-level-style-number text:level="10" style:num-format="1" style:num-suffix=".">
        <style:list-level-properties text:list-level-position-and-space-mode="label-alignment">
          <style:list-level-label-alignment text:label-followed-by="listtab" text:list-tab-stop-position="5.000cm" fo:text-indent="-0.5cm" fo:margin-left="5.000cm"/>
        </style:list-level-properties>
      </text:list-level-style-number>
    </text:list-style>
    <text:list-style style:name="docir_ol_a">
      <text:list-level-style-number text:level="1" style:num-format="a" style:num-suffix=".">
        <style:list-level-properties text:list-level-position-and-space-mode="label-alignment">
          <style:list-level-label-alignment text:label-followed-by="listtab" text:list-tab-stop-position="0.500cm" fo:text-indent="-0.5cm" fo:margin-left="0.500cm"/>
        </style:list-level-properties>
      </text:list-level-style-number>
      <text:list-level-style-number text:level="2" style:num-format="a" style:num-suffix=".">
        <style:list-level-properties text:list-level-position-and-space-mode="label-alignment">
          <style:list-level-label-alignment text:label-followed-by="listtab" text:list-tab-stop-position="1.000cm" fo:text-indent="-0.5cm" fo:margin-left="1.000cm"/>
        </style:list-level-properties>
      </text:list-level-style-number>
      <text:list-level-style-number text:level="3" style:num-format="a" style:num-suffix=".">
        <style:list-level-properties text:list-level-position-and-space-mode="label-alignment">
          <style:list-level-label-alignment text:label-followed-by="listtab" text:list-tab-stop-position="1.500cm" fo:text-indent="-0.5cm" fo:margin-left="1.500cm"/>
        </style:list-level-properties>
      </text:list-level-style-number>
      <text:list-level-style-number text:level="4" style:num-format="a" style:num-suffix=".">
        <style:list-level-properties text:list-level-position-and-space-mode="label-alignment">
          <style:list-level-label-alignment text:label-followed-by="listtab" text:list-tab-stop-position="2.000cm" fo:text-indent="-0.5cm" fo:margin-left="2.000cm"/>
        </style:list-level-properties>
      </text:list-level-style-number>
      <text:list-level-style-number text:level="5" style:num-format="a" style:num-suffix=".">
        <style:list-level-properties text:list-level-position-and-space-mode="label-alignment">
          <style:list-level-label-alignment text:label-followed-by="listtab" text:list-tab-stop-position="2.500cm" fo:text-indent="-0.5cm" fo:margin-left="2.500cm"/>
        </style:list-level-properties>
      </text:list-level-style-number>
      <text:list-level-style-number text:level="6" style:num-format="a" style:num-suffix=".">
        <style:list-level-properties text:list-level-position-and-space-mode="label-alignment">
          <style:list-level-label-alignment text:label-followed-by="listtab" text:list-tab-stop-position="3.000cm" fo:text-indent="-0.5cm" fo:margin-left="3.000cm"/>
        </style:list-level-properties>
      </text:list-level-style-number>
      <text:list-level-style-number text:level="7" style:num-format="a" style:num-suffix=".">
        <style:list-level-properties text:list-level-position-and-space-mode="label-alignment">
          <style:list-level-label-alignment text:label-followed-by="listtab" text:list-tab-stop-position="3.500cm" fo:text-indent="-0.5cm" fo:margin-left="3.500cm"/>
        </style:list-level-properties>
      </text:list-level-style-number>
      <text:list-level-style-number text:level="8" style:num-format="a" style:num-suffix=".">
        <style:list-level-properties text:list-level-position-and-space-mode="label-alignment">
          <style:list-level-label-alignment text:label-followed-by="listtab" text:list-tab-stop-position="4.000cm" fo:text-indent="-0.5cm" fo:margin-left="4.000cm"/>
        </style:list-level-properties>
      </text:list-level-style-number>
      <text:list-level-style-number text:level="9" style:num-format="a" style:num-suffix=".">
        <style:list-level-properties text:list-level-position-and-space-mode="label-alignment">
          <style:list-level-label-alignment text:label-followed-by="listtab" text:list-tab-stop-position="4.500cm" fo:text-indent="-0.5cm" fo:margin-left="4.500cm"/>
        </style:list-level-properties>
      </text:list-level-style-number>
      <text:list-level-style-number text:level="10" style:num-format="a" style:num-suffix=".">
        <style:list-level-properties text:list-level-position-and-space-mode="label-alignment">
          <style:list-level-label-alignment text:label-followed-by="listtab" text:list-tab-stop-position="5.000cm" fo:text-indent="-0.5cm" fo:margin-left="5.000cm"/>
        </style:list-level-properties>
      </text:list-level-style-number>
    </text:list-style>
    <text:list-style style:name="docir_ol_A">
      <text:list-level-style-number text:level="1" style:num-format="A" style:num-suffix=".">
        <style:list-level-properties text:list-level-position-and-space-mode="label-alignment">
          <style:list-level-label-alignment text:label-followed-by="listtab" text:list-tab-stop-position="0.500cm" fo:text-indent="-0.5cm" fo:margin-left="0.500cm"/>
        </style:list-level-properties>
      </text:list-level-style-number>
      <text:list-level-style-number text:level="2" style:num-format="A" style:num-suffix=".">
        <style:list-level-properties text:list-level-position-and-space-mode="label-alignment">
          <style:list-level-label-alignment text:label-followed-by="listtab" text:list-tab-stop-position="1.000cm" fo:text-indent="-0.5cm" fo:margin-left="1.000cm"/>
        </style:list-level-properties>
      </text:list-level-style-number>
      <text:list-level-style-number text:level="3" style:num-format="A" style:num-suffix=".">
        <style:list-level-properties text:list-level-position-and-space-mode="label-alignment">
          <style:list-level-label-alignment text:label-followed-by="listtab" text:list-tab-stop-position="1.500cm" fo:text-indent="-0.5cm" fo:margin-left="1.500cm"/>
        </style:list-level-properties>
      </text:list-level-style-number>
      <text:list-level-style-number text:level="4" style:num-format="A" style:num-suffix=".">
        <style:list-level-properties text:list-level-position-and-space-mode="label-alignment">
          <style:list-level-label-alignment text:label-followed-by="listtab" text:list-tab-stop-position="2.000cm" fo:text-indent="-0.5cm" fo:margin-left="2.000cm"/>
        </style:list-level-properties>
      </text:list-level-style-number>
      <text:list-level-style-number text:level="5" style:num-format="A" style:num-suffix=".">
        <style:list-level-properties text:list-level-position-and-space-mode="label-alignment">
          <style:list-level-label-alignment text:label-followed-by="listtab" text:list-tab-stop-position="2.500cm" fo:text-indent="-0.5cm" fo:margin-left="2.500cm"/>
        </style:list-level-properties>
      </text:list-level-style-number>
      <text:list-level-style-number text:level="6" style:num-format="A" style:num-suffix=".">
        <style:list-level-properties text:list-level-position-and-space-mode="label-alignment">
          <style:list-level-label-alignment text:label-followed-by="listtab" text:list-tab-stop-position="3.000cm" fo:text-indent="-0.5cm" fo:margin-left="3.000cm"/>
        </style:list-level-properties>
      </text:list-level-style-number>
      <text:list-level-style-number text:level="7" style:num-format="A" style:num-suffix=".">
        <style:list-level-properties text:list-level-position-and-space-mode="label-alignment">
          <style:list-level-label-alignment text:label-followed-by="listtab" text:list-tab-stop-position="3.500cm" fo:text-indent="-0.5cm" fo:margin-left="3.500cm"/>
        </style:list-level-properties>
      </text:list-level-style-number>
      <text:list-level-style-number text:level="8" style:num-format="A" style:num-suffix=".">
        <style:list-level-properties text:list-level-position-and-space-mode="label-alignment">
          <style:list-level-label-alignment text:label-followed-by="listtab" text:list-tab-stop-position="4.000cm" fo:text-indent="-0.5cm" fo:margin-left="4.000cm"/>
        </style:list-level-properties>
      </text:list-level-style-number>
      <text:list-level-style-number text:level="9" style:num-format="A" style:num-suffix=".">
        <style:list-level-properties text:list-level-position-and-space-mode="label-alignment">
          <style:list-level-label-alignment text:label-followed-by="listtab" text:list-tab-stop-position="4.500cm" fo:text-indent="-0.5cm" fo:margin-left="4.500cm"/>
        </style:list-level-properties>
      </text:list-level-style-number>
      <text:list-level-style-number text:level="10" style:num-format="A" style:num-suffix=".">
        <style:list-level-properties text:list-level-position-and-space-mode="label-alignment">
          <style:list-level-label-alignment text:label-followed-by="listtab" text:list-tab-stop-position="5.000cm" fo:text-indent="-0.5cm" fo:margin-left="5.000cm"/>
        </style:list-level-properties>
      </text:list-level-style-number>
    </text:list-style>
    <text:list-style style:name="docir_ol_i">
      <text:list-level-style-number text:level="1" style:num-format="i" style:num-suffix=".">
        <style:list-level-properties text:list-level-position-and-space-mode="label-alignment">
          <style:list-level-label-alignment text:label-followed-by="listtab" text:list-tab-stop-position="0.500cm" fo:text-indent="-0.5cm" fo:margin-left="0.500cm"/>
        </style:list-level-properties>
      </text:list-level-style-number>
      <text:list-level-style-number text:level="2" style:num-format="i" style:num-suffix=".">
        <style:list-level-properties text:list-level-position-and-space-mode="label-alignment">
          <style:list-level-label-alignment text:label-followed-by="listtab" text:list-tab-stop-position="1.000cm" fo:text-indent="-0.5cm" fo:margin-left="1.000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text:label-followed-by="listtab" text:list-tab-stop-position="1.500cm" fo:text-indent="-0.5cm" fo:margin-left="1.500cm"/>
        </style:list-level-properties>
      </text:list-level-style-number>
      <text:list-level-style-number text:level="4" style:num-format="i" style:num-suffix=".">
        <style:list-level-properties text:list-level-position-and-space-mode="label-alignment">
          <style:list-level-label-alignment text:label-followed-by="listtab" text:list-tab-stop-position="2.000cm" fo:text-indent="-0.5cm" fo:margin-left="2.000cm"/>
        </style:list-level-properties>
      </text:list-level-style-number>
      <text:list-level-style-number text:level="5" style:num-format="i" style:num-suffix=".">
        <style:list-level-properties text:list-level-position-and-space-mode="label-alignment">
          <style:list-level-label-alignment text:label-followed-by="listtab" text:list-tab-stop-position="2.500cm" fo:text-indent="-0.5cm" fo:margin-left="2.500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text:label-followed-by="listtab" text:list-tab-stop-position="3.000cm" fo:text-indent="-0.5cm" fo:margin-left="3.000cm"/>
        </style:list-level-properties>
      </text:list-level-style-number>
      <text:list-level-style-number text:level="7" style:num-format="i" style:num-suffix=".">
        <style:list-level-properties text:list-level-position-and-space-mode="label-alignment">
          <style:list-level-label-alignment text:label-followed-by="listtab" text:list-tab-stop-position="3.500cm" fo:text-indent="-0.5cm" fo:margin-left="3.500cm"/>
        </style:list-level-properties>
      </text:list-level-style-number>
      <text:list-level-style-number text:level="8" style:num-format="i" style:num-suffix=".">
        <style:list-level-properties text:list-level-position-and-space-mode="label-alignment">
          <style:list-level-label-alignment text:label-followed-by="listtab" text:list-tab-stop-position="4.000cm" fo:text-indent="-0.5cm" fo:margin-left="4.000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text:label-followed-by="listtab" text:list-tab-stop-position="4.500cm" fo:text-indent="-0.5cm" fo:margin-left="4.500cm"/>
        </style:list-level-properties>
      </text:list-level-style-number>
      <text:list-level-style-number text:level="10" style:num-format="i" style:num-suffix=".">
        <style:list-level-properties text:list-level-position-and-space-mode="label-alignment">
          <style:list-level-label-alignment text:label-followed-by="listtab" text:list-tab-stop-position="5.000cm" fo:text-indent="-0.5cm" fo:margin-left="5.000cm"/>
        </style:list-level-properties>
      </text:list-level-style-number>
    </text:list-style>
    <text:list-style style:name="docir_ol_I">
      <text:list-level-style-number text:level="1" style:num-format="I" style:num-suffix=".">
        <style:list-level-properties text:list-level-position-and-space-mode="label-alignment">
          <style:list-level-label-alignment text:label-followed-by="listtab" text:list-tab-stop-position="0.500cm" fo:text-indent="-0.5cm" fo:margin-left="0.500cm"/>
        </style:list-level-properties>
      </text:list-level-style-number>
      <text:list-level-style-number text:level="2" style:num-format="I" style:num-suffix=".">
        <style:list-level-properties text:list-level-position-and-space-mode="label-alignment">
          <style:list-level-label-alignment text:label-followed-by="listtab" text:list-tab-stop-position="1.000cm" fo:text-indent="-0.5cm" fo:margin-left="1.000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text:label-followed-by="listtab" text:list-tab-stop-position="1.500cm" fo:text-indent="-0.5cm" fo:margin-left="1.500cm"/>
        </style:list-level-properties>
      </text:list-level-style-number>
      <text:list-level-style-number text:level="4" style:num-format="I" style:num-suffix=".">
        <style:list-level-properties text:list-level-position-and-space-mode="label-alignment">
          <style:list-level-label-alignment text:label-followed-by="listtab" text:list-tab-stop-position="2.000cm" fo:text-indent="-0.5cm" fo:margin-left="2.000cm"/>
        </style:list-level-properties>
      </text:list-level-style-number>
      <text:list-level-style-number text:level="5" style:num-format="I" style:num-suffix=".">
        <style:list-level-properties text:list-level-position-and-space-mode="label-alignment">
          <style:list-level-label-alignment text:label-followed-by="listtab" text:list-tab-stop-position="2.500cm" fo:text-indent="-0.5cm" fo:margin-left="2.500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text:label-followed-by="listtab" text:list-tab-stop-position="3.000cm" fo:text-indent="-0.5cm" fo:margin-left="3.000cm"/>
        </style:list-level-properties>
      </text:list-level-style-number>
      <text:list-level-style-number text:level="7" style:num-format="I" style:num-suffix=".">
        <style:list-level-properties text:list-level-position-and-space-mode="label-alignment">
          <style:list-level-label-alignment text:label-followed-by="listtab" text:list-tab-stop-position="3.500cm" fo:text-indent="-0.5cm" fo:margin-left="3.500cm"/>
        </style:list-level-properties>
      </text:list-level-style-number>
      <text:list-level-style-number text:level="8" style:num-format="I" style:num-suffix=".">
        <style:list-level-properties text:list-level-position-and-space-mode="label-alignment">
          <style:list-level-label-alignment text:label-followed-by="listtab" text:list-tab-stop-position="4.000cm" fo:text-indent="-0.5cm" fo:margin-left="4.000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text:label-followed-by="listtab" text:list-tab-stop-position="4.500cm" fo:text-indent="-0.5cm" fo:margin-left="4.500cm"/>
        </style:list-level-properties>
      </text:list-level-style-number>
      <text:list-level-style-number text:level="10" style:num-format="I" style:num-suffix=".">
        <style:list-level-properties text:list-level-position-and-space-mode="label-alignment">
          <style:list-level-label-alignment text:label-followed-by="listtab" text:list-tab-stop-position="5.000cm" fo:text-indent="-0.5cm" fo:margin-left="5.000cm"/>
        </style:list-level-properties>
      </text:list-level-style-number>
    </text:list-style>
    <text:list-style style:name="docir_ul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00cm" fo:text-indent="-0.5cm" fo:margin-left="0.500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000cm" fo:text-indent="-0.5cm" fo:margin-left="1.000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00cm" fo:text-indent="-0.5cm" fo:margin-left="1.500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.000cm" fo:text-indent="-0.5cm" fo:margin-left="2.000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00cm" fo:text-indent="-0.5cm" fo:margin-left="2.500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.000cm" fo:text-indent="-0.5cm" fo:margin-left="3.000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00cm" fo:text-indent="-0.5cm" fo:margin-left="3.500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.000cm" fo:text-indent="-0.5cm" fo:margin-left="4.000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00cm" fo:text-indent="-0.5cm" fo:margin-left="4.500cm"/>
        </style:list-level-properties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5.000cm" fo:text-indent="-0.5cm" fo:margin-left="5.000cm"/>
        </style:list-level-properties>
      </text:list-level-style-bullet>
    </text:list-style>
  </office:styles>
  <office:automatic-styles/>
  <office:master-styles/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odf-tcl</meta:generator>
  </office:meta>
</office:document-meta>
</file>