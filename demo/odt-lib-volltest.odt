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xlink="http://www.w3.org/1999/xlink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785EA360930847D89E05062EA13DA6CA.png" manifest:media-type="image/png"/>
  <manifest:file-entry manifest:full-path="Pictures/779F24627DA84C94B94DC9E5309915EC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xlink="http://www.w3.org/1999/xlink" xmlns:draw="urn:oasis:names:tc:opendocument:xmlns:drawing:1.0" xmlns:svg="urn:oasis:names:tc:opendocument:xmlns:svg-compatible:1.0" xmlns:manifest="urn:oasis:names:tc:opendocument:xmlns:manifest:1.0" office:version="1.2">
  <office:automatic-styles>
    <style:style style:name="AutoP_CenterBlue" style:family="paragraph" style:display-name="AutoP_CenterBlue">
      <style:text-properties fo:font-size="12pt" fo:font-weight="bold" fo:color="#0044AA"/>
      <style:paragraph-properties fo:text-align="center" fo:background-color="#EEF5FF" fo:padding="0.15cm"/>
    </style:style>
    <style:style style:name="AutoP_RightRed" style:family="paragraph" style:display-name="AutoP_RightRed">
      <style:text-properties fo:font-size="11pt" fo:color="#AA0000"/>
      <style:paragraph-properties fo:text-align="end" fo:margin-left="1cm"/>
    </style:style>
    <style:style style:name="AutoP_CodeBlock" style:family="paragraph" style:display-name="AutoP_CodeBlock">
      <style:text-properties fo:font-family="Courier New" fo:font-size="9pt"/>
      <style:paragraph-properties fo:background-color="#F7F7F7" fo:margin-left="0.5cm" fo:margin-right="0.5cm" fo:padding="0.15cm"/>
    </style:style>
    <style:style style:name="AutoT_GreenBold" style:family="text" style:display-name="AutoT_GreenBold">
      <style:text-properties fo:color="#008844" fo:font-weight="bold"/>
    </style:style>
    <style:style style:name="AutoT_BigItalic" style:family="text" style:display-name="AutoT_BigItalic">
      <style:text-properties fo:font-size="16pt" fo:font-style="italic"/>
    </style:style>
    <style:style style:name="AutoCell_Warn" style:family="table-cell" style:display-name="AutoCell_Warn">
      <style:table-cell-properties fo:background-color="#FFE5E5" fo:border="0.05pt solid #AA0000"/>
    </style:style>
    <style:style style:name="AutoCell_Ok" style:family="table-cell" style:display-name="AutoCell_Ok">
      <style:table-cell-properties fo:background-color="#E5FFE5" fo:border="0.05pt solid #008800"/>
    </style:style>
    <style:style style:name="AutoGraphic_Frame" style:family="graphic" style:display-name="AutoGraphic_Frame">
      <style:graphic-properties fo:border="0.07pt solid #003366" fo:padding="0.07cm"/>
    </style:style>
  </office:automatic-styles>
  <office:body>
    <office:text>
      <text:h text:outline-level="1" text:style-name="Common_Title">ODT-Lib Volltest fuer Parser, Style-Registry, IR und Renderer</text:h>
      <text:p text:style-name="Common_Body">Dieses Dokument enthaelt moeglichst viele typische ODT-Elemente fuer eine Tcl/Tk-Lib: <text:span text:style-name="Common_Bold">Struktur</text:span>, <text:span text:style-name="Common_Italic">Styles</text:span>, <text:span text:style-name="AutoT_GreenBold">automatic-styles</text:span>, Tabellen, Listen, Bilder, Links, Bookmarks und Sonderfaelle.</text:p>
      <text:p text:style-name="Common_Body">Erstellt: 24.05.2026 03:35:05</text:p>
      <text:h text:outline-level="2" text:style-name="Common_H2">0. Testabdeckung</text:h>
      <table:table table:name="CoverageMatrix">
        <table:table-column/>
        <table:table-column/>
        <table:table-column/>
        <table:table-column/>
        <table:table-row>
          <table:table-cell table:style-name="Common_CellHeader">
            <text:p>Bereich</text:p>
          </table:table-cell>
          <table:table-cell table:style-name="Common_CellHeader">
            <text:p>Elemente</text:p>
          </table:table-cell>
          <table:table-cell table:style-name="Common_CellHeader">
            <text:p>Soll fuer Parser</text:p>
          </table:table-cell>
          <table:table-cell table:style-name="Common_CellHeader">
            <text:p>Prioritaet</text:p>
          </table:table-cell>
        </table:table-row>
        <table:table-row>
          <table:table-cell table:style-name="Common_CellPlain">
            <text:p>Struktur</text:p>
          </table:table-cell>
          <table:table-cell table:style-name="Common_CellPlain">
            <text:p>H1-H6, P, LineBreak</text:p>
          </table:table-cell>
          <table:table-cell table:style-name="Common_CellPlain">
            <text:p>Blocktypen und Reihenfolge erkennen</text:p>
          </table:table-cell>
          <table:table-cell table:style-name="Common_CellPlain">
            <text:p>hoch</text:p>
          </table:table-cell>
        </table:table-row>
        <table:table-row>
          <table:table-cell table:style-name="Common_CellPlain">
            <text:p>Inline</text:p>
          </table:table-cell>
          <table:table-cell table:style-name="Common_CellPlain">
            <text:p>span, strong, emphasis, mono, link</text:p>
          </table:table-cell>
          <table:table-cell table:style-name="Common_CellPlain">
            <text:p>Inline-AST erzeugen</text:p>
          </table:table-cell>
          <table:table-cell table:style-name="Common_CellPlain">
            <text:p>hoch</text:p>
          </table:table-cell>
        </table:table-row>
        <table:table-row>
          <table:table-cell table:style-name="Common_CellPlain">
            <text:p>Styles</text:p>
          </table:table-cell>
          <table:table-cell table:style-name="Common_CellPlain">
            <text:p>styles.xml + automatic-styles</text:p>
          </table:table-cell>
          <table:table-cell table:style-name="Common_CellPlain">
            <text:p>source, family, properties aufloesen</text:p>
          </table:table-cell>
          <table:table-cell table:style-name="Common_CellPlain">
            <text:p>hoch</text:p>
          </table:table-cell>
        </table:table-row>
        <table:table-row>
          <table:table-cell table:style-name="Common_CellPlain">
            <text:p>Listen</text:p>
          </table:table-cell>
          <table:table-cell table:style-name="Common_CellPlain">
            <text:p>einfach + verschachtelt</text:p>
          </table:table-cell>
          <table:table-cell table:style-name="Common_CellPlain">
            <text:p>list/listItem/Level erkennen</text:p>
          </table:table-cell>
          <table:table-cell table:style-name="Common_CellPlain">
            <text:p>hoch</text:p>
          </table:table-cell>
        </table:table-row>
        <table:table-row>
          <table:table-cell table:style-name="Common_CellPlain">
            <text:p>Tabellen</text:p>
          </table:table-cell>
          <table:table-cell table:style-name="Common_CellPlain">
            <text:p>Header, leere Zellen, multiline, spans in cell</text:p>
          </table:table-cell>
          <table:table-cell table:style-name="Common_CellPlain">
            <text:p>tableRow/tableCell erhalten</text:p>
          </table:table-cell>
          <table:table-cell table:style-name="Common_CellPlain">
            <text:p>hoch</text:p>
          </table:table-cell>
        </table:table-row>
        <table:table-row>
          <table:table-cell table:style-name="Common_CellPlain">
            <text:p>Bilder</text:p>
          </table:table-cell>
          <table:table-cell table:style-name="Common_CellPlain">
            <text:p>draw:frame + draw:image</text:p>
          </table:table-cell>
          <table:table-cell table:style-name="Common_CellPlain">
            <text:p>Manifest, href, Groesse, style</text:p>
          </table:table-cell>
          <table:table-cell table:style-name="Common_CellPlain">
            <text:p>hoch</text:p>
          </table:table-cell>
        </table:table-row>
        <table:table-row>
          <table:table-cell table:style-name="Common_CellPlain">
            <text:p>Sonderfaelle</text:p>
          </table:table-cell>
          <table:table-cell table:style-name="Common_CellPlain">
            <text:p>Bookmark, Unicode, Boxdrawing</text:p>
          </table:table-cell>
          <table:table-cell table:style-name="Common_CellPlain">
            <text:p>robustes UTF-8/Textmodell</text:p>
          </table:table-cell>
          <table:table-cell table:style-name="Common_CellPlain">
            <text:p>mittel</text:p>
          </table:table-cell>
        </table:table-row>
      </table:table>
      <text:h text:outline-level="2" text:style-name="Common_H2">1. Ueberschriften H1 bis H6</text:h>
      <text:h text:outline-level="1" text:style-name="None">Heading Ebene 1</text:h>
      <text:h text:outline-level="2" text:style-name="None">Heading Ebene 2</text:h>
      <text:h text:outline-level="3" text:style-name="None">Heading Ebene 3</text:h>
      <text:h text:outline-level="4" text:style-name="None">Heading Ebene 4</text:h>
      <text:h text:outline-level="5" text:style-name="None">Heading Ebene 5</text:h>
      <text:h text:outline-level="6" text:style-name="None">Heading Ebene 6</text:h>
      <text:h text:outline-level="2" text:style-name="Common_H2">2. Absatz- und Text-Styles</text:h>
      <text:p text:style-name="Common_Body">Common_Body: normaler Absatz aus styles.xml.</text:p>
      <text:p text:style-name="AutoP_CenterBlue">AutoP_CenterBlue: automatischer Absatzstyle aus content.xml/office:automatic-styles.</text:p>
      <text:p text:style-name="AutoP_RightRed">AutoP_RightRed: automatischer rechtsbuendiger Absatzstyle aus content.xml/office:automatic-styles.</text:p>
      <text:p text:style-name="Common_Quote">Common_Quote: eingerueckter Absatz mit Hintergrund und kursiver Schrift.</text:p>
      <text:p text:style-name="Common_Body">Normal <text:span text:style-name="Common_Bold">Bold </text:span><text:span text:style-name="Common_Italic">Italic </text:span><text:span text:style-name="Common_Mono">Mono </text:span><text:span text:style-name="Common_Red">Red </text:span><text:span text:style-name="Common_Blue">Blue </text:span><text:span text:style-name="Common_Underline">Underline </text:span><text:span text:style-name="Common_Strike">Strike </text:span><text:span text:style-name="AutoT_GreenBold">AutoGreen </text:span><text:span text:style-name="AutoT_BigItalic">AutoBigItalic </text:span> H<text:span text:style-name="Common_Sub">2</text:span>O x<text:span text:style-name="Common_Sup">2</text:span></text:p>
      <text:h text:outline-level="2" text:style-name="Common_H2">3. Links, Bookmarks und LineBreaks</text:h>
      <text:p text:style-name="Common_Body">Externer Link: <text:a xlink:href="https://www.tcl.tk/" xlink:type="simple">Tcl/Tk Webseite</text:a></text:p>
      <text:p text:style-name="Common_Body"><text:bookmark-start text:name="volltest-bookmark"/>Bookmark-Ziel: volltest-bookmark<text:bookmark-end text:name="volltest-bookmark"/></text:p>
      <text:p text:style-name="Common_Body">Zeile 1<text:line-break/>Zeile 2<text:line-break/>Zeile 3</text:p>
      <text:h text:outline-level="2" text:style-name="Common_H2">4. Listen</text:h>
      <text:p text:style-name="Common_Body">Einfache Liste:</text:p>
      <text:list>
        <text:list-item>
          <text:p>Eintrag A</text:p>
        </text:list-item>
        <text:list-item>
          <text:p>Eintrag B mit Umlaut äöü</text:p>
        </text:list-item>
        <text:list-item>
          <text:p>Eintrag C</text:p>
        </text:list-item>
      </text:list>
      <text:p text:style-name="Common_Body">Verschachtelte Liste:</text:p>
      <text:list>
        <text:list-item>
          <text:p>GUI</text:p>
          <text:list>
            <text:list-item>
              <text:p>Tk</text:p>
            </text:list-item>
            <text:list-item>
              <text:p>ttk</text:p>
            </text:list-item>
            <text:list-item>
              <text:p>tablelist</text:p>
            </text:list-item>
            <text:list-item>
              <text:p>canvas</text:p>
            </text:list-item>
          </text:list>
        </text:list-item>
        <text:list-item>
          <text:p>Datenbank</text:p>
          <text:list>
            <text:list-item>
              <text:p>SQLite</text:p>
            </text:list-item>
            <text:list-item>
              <text:p>PostgreSQL</text:p>
            </text:list-item>
            <text:list-item>
              <text:p>Oracle</text:p>
            </text:list-item>
          </text:list>
        </text:list-item>
        <text:list-item>
          <text:p>Export</text:p>
          <text:list>
            <text:list-item>
              <text:p>ODT</text:p>
            </text:list-item>
            <text:list-item>
              <text:p>PDF</text:p>
            </text:list-item>
            <text:list-item>
              <text:p>HTML</text:p>
            </text:list-item>
            <text:list-item>
              <text:p>Markdown</text:p>
            </text:list-item>
          </text:list>
        </text:list-item>
      </text:list>
      <text:h text:outline-level="2" text:style-name="Common_H2">5. Tabellen</text:h>
      <table:table table:name="StyleRegistry">
        <table:table-column/>
        <table:table-column/>
        <table:table-column/>
        <table:table-column/>
        <table:table-column/>
        <table:table-row>
          <table:table-cell table:style-name="Common_CellHeader">
            <text:p>Style</text:p>
          </table:table-cell>
          <table:table-cell table:style-name="Common_CellHeader">
            <text:p>Family</text:p>
          </table:table-cell>
          <table:table-cell table:style-name="Common_CellHeader">
            <text:p>Source</text:p>
          </table:table-cell>
          <table:table-cell table:style-name="Common_CellHeader">
            <text:p>Property-Gruppe</text:p>
          </table:table-cell>
          <table:table-cell table:style-name="Common_CellHeader">
            <text:p>Beispiel</text:p>
          </table:table-cell>
        </table:table-row>
        <table:table-row>
          <table:table-cell table:style-name="Common_CellPlain">
            <text:p>Common_Title</text:p>
          </table:table-cell>
          <table:table-cell table:style-name="Common_CellPlain">
            <text:p>paragraph</text:p>
          </table:table-cell>
          <table:table-cell table:style-name="Common_CellPlain">
            <text:p>styles.xml</text:p>
          </table:table-cell>
          <table:table-cell table:style-name="Common_CellPlain">
            <text:p>text/paragraph</text:p>
          </table:table-cell>
          <table:table-cell table:style-name="Common_CellPlain">
            <text:p>font-size=24pt<text:line-break/>font-weight=bold</text:p>
          </table:table-cell>
        </table:table-row>
        <table:table-row>
          <table:table-cell table:style-name="Common_CellPlain">
            <text:p>Common_Bold</text:p>
          </table:table-cell>
          <table:table-cell table:style-name="Common_CellPlain">
            <text:p>text</text:p>
          </table:table-cell>
          <table:table-cell table:style-name="Common_CellPlain">
            <text:p>styles.xml</text:p>
          </table:table-cell>
          <table:table-cell table:style-name="Common_CellPlain">
            <text:p>text-properties</text:p>
          </table:table-cell>
          <table:table-cell table:style-name="Common_CellPlain">
            <text:p>font-weight=bold</text:p>
          </table:table-cell>
        </table:table-row>
        <table:table-row>
          <table:table-cell table:style-name="AutoCell_Warn">
            <text:p>AutoP_CenterBlue</text:p>
          </table:table-cell>
          <table:table-cell table:style-name="Common_CellPlain">
            <text:p>paragraph</text:p>
          </table:table-cell>
          <table:table-cell table:style-name="Common_CellPlain">
            <text:p>content.xml/automatic-styles</text:p>
          </table:table-cell>
          <table:table-cell table:style-name="Common_CellPlain">
            <text:p>paragraph/text</text:p>
          </table:table-cell>
          <table:table-cell table:style-name="Common_CellPlain">
            <text:p>text-align=center<text:line-break/>background=#EEF5FF</text:p>
          </table:table-cell>
        </table:table-row>
        <table:table-row>
          <table:table-cell table:style-name="AutoCell_Warn">
            <text:p>AutoT_GreenBold</text:p>
          </table:table-cell>
          <table:table-cell table:style-name="Common_CellPlain">
            <text:p>text</text:p>
          </table:table-cell>
          <table:table-cell table:style-name="Common_CellPlain">
            <text:p>content.xml/automatic-styles</text:p>
          </table:table-cell>
          <table:table-cell table:style-name="Common_CellPlain">
            <text:p>text-properties</text:p>
          </table:table-cell>
          <table:table-cell table:style-name="Common_CellPlain">
            <text:p>color=#008844<text:line-break/>font-weight=bold</text:p>
          </table:table-cell>
        </table:table-row>
        <table:table-row>
          <table:table-cell table:style-name="AutoCell_Ok">
            <text:p>AutoCell_Ok</text:p>
          </table:table-cell>
          <table:table-cell table:style-name="Common_CellPlain">
            <text:p>table-cell</text:p>
          </table:table-cell>
          <table:table-cell table:style-name="Common_CellPlain">
            <text:p>content.xml/automatic-styles</text:p>
          </table:table-cell>
          <table:table-cell table:style-name="Common_CellPlain">
            <text:p>table-cell-properties</text:p>
          </table:table-cell>
          <table:table-cell table:style-name="Common_CellPlain">
            <text:p>background=#E5FFE5<text:line-break/>border</text:p>
          </table:table-cell>
        </table:table-row>
        <table:table-row>
          <table:table-cell table:style-name="AutoCell_Warn">
            <text:p>AutoGraphic_Frame</text:p>
          </table:table-cell>
          <table:table-cell table:style-name="Common_CellPlain">
            <text:p>graphic</text:p>
          </table:table-cell>
          <table:table-cell table:style-name="Common_CellPlain">
            <text:p>content.xml/automatic-styles</text:p>
          </table:table-cell>
          <table:table-cell table:style-name="Common_CellPlain">
            <text:p>graphic-properties</text:p>
          </table:table-cell>
          <table:table-cell table:style-name="Common_CellPlain">
            <text:p>border<text:line-break/>padding</text:p>
          </table:table-cell>
        </table:table-row>
      </table:table>
      <text:p text:style-name="Common_Body">Tabelle mit leeren Zellen, LineBreaks und Spans in Zellen:</text:p>
      <table:table table:name="CellEdgeCases">
        <table:table-column/>
        <table:table-column/>
        <table:table-column/>
        <table:table-column/>
        <table:table-row>
          <table:table-cell table:style-name="Common_CellHeader">
            <text:p>Typ</text:p>
          </table:table-cell>
          <table:table-cell table:style-name="Common_CellHeader">
            <text:p>Inhalt</text:p>
          </table:table-cell>
          <table:table-cell table:style-name="Common_CellHeader">
            <text:p>Erwartung</text:p>
          </table:table-cell>
          <table:table-cell table:style-name="Common_CellHeader">
            <text:p>Status</text:p>
          </table:table-cell>
        </table:table-row>
        <table:table-row>
          <table:table-cell table:style-name="Common_CellPlain">
            <text:p>leer</text:p>
          </table:table-cell>
          <table:table-cell table:style-name="Common_CellPlain">
            <text:p/>
          </table:table-cell>
          <table:table-cell table:style-name="Common_CellPlain">
            <text:p>leere Zelle bleibt leer</text:p>
          </table:table-cell>
          <table:table-cell table:style-name="Common_CellPlain">
            <text:p>OK</text:p>
          </table:table-cell>
        </table:table-row>
        <table:table-row>
          <table:table-cell table:style-name="Common_CellPlain">
            <text:p>linebreak</text:p>
          </table:table-cell>
          <table:table-cell table:style-name="Common_CellPlain">
            <text:p>A<text:line-break/>B<text:line-break/>C</text:p>
          </table:table-cell>
          <table:table-cell table:style-name="Common_CellPlain">
            <text:p>text:line-break erhalten</text:p>
          </table:table-cell>
          <table:table-cell table:style-name="Common_CellPlain">
            <text:p>OK</text:p>
          </table:table-cell>
        </table:table-row>
        <table:table-row>
          <table:table-cell table:style-name="Common_CellPlain">
            <text:p>span</text:p>
          </table:table-cell>
          <table:table-cell table:style-name="Common_CellPlain">
            <text:p><text:span text:style-name="Common_Bold">Fett</text:span> + <text:span text:style-name="Common_Red">rot</text:span> + <text:span text:style-name="AutoT_GreenBold">auto</text:span></text:p>
          </table:table-cell>
          <table:table-cell table:style-name="Common_CellPlain">
            <text:p>Spans in table-cell</text:p>
          </table:table-cell>
          <table:table-cell table:style-name="Common_CellPlain">
            <text:p>OK</text:p>
          </table:table-cell>
        </table:table-row>
      </table:table>
      <text:h text:outline-level="2" text:style-name="Common_H2">6. Bilder und Frames</text:h>
      <text:p><draw:frame draw:style-name="Common_ImageFrame" svg:width="14cm" svg:height="4.2cm"><draw:image xlink:href="Pictures/785EA360930847D89E05062EA13DA6CA.png"/></draw:frame></text:p>
      <text:p><draw:frame draw:style-name="AutoGraphic_Frame" svg:width="9cm" svg:height="3cm"><draw:image xlink:href="Pictures/779F24627DA84C94B94DC9E5309915EC.png"/></draw:frame></text:p>
      <text:h text:outline-level="2" text:style-name="Common_H2">7. Draw TextBox</text:h>
      <text:p><draw:frame draw:style-name="AutoGraphic_Frame" svg:width="10cm" svg:height="2cm"><draw:text-box><text:p>Text in draw:text-box innerhalb draw:frame.</text:p></draw:text-box></draw:frame></text:p>
      <text:h text:outline-level="2" text:style-name="Common_H2">8. Codebloecke</text:h>
      <text:p text:style-name="Common_Code">package require docir::odt<text:line-break/>set ir [docir::odtSource::fromOdt input.odt]<text:line-break/>docir::odt::write $ir output.odt</text:p>
      <text:p text:style-name="AutoP_CodeBlock"># automatic-styles pruefen:<text:line-break/>content.xml<text:line-break/>  office:automatic-styles<text:line-break/>    style:style style:name="AutoP_CenterBlue"<text:line-break/>    style:style style:name="AutoT_GreenBold"<text:line-break/>    style:style style:name="AutoCell_Ok" </text:p>
      <text:h text:outline-level="2" text:style-name="Common_H2">9. Unicode und Sonderzeichen</text:h>
      <text:p text:style-name="Common_Body">Umlaute: ä ö ü Ä Ö Ü ß</text:p>
      <text:p text:style-name="Common_Body">Waehrungen: € $ £ ¥</text:p>
      <text:p text:style-name="Common_Body">Mathematik: ± × ÷ ≈ ≠ ≤ ≥ ∑ √ ∞</text:p>
      <text:p text:style-name="Common_Body">Pfeile: ← ↑ → ↓ ⇐ ⇒ ↔</text:p>
      <text:p text:style-name="Common_Body">Symbole: © ® ™ § ¶</text:p>
      <text:p text:style-name="Common_Body">Boxdrawing: ┌─┬─┐ │ │ └─┴─┘</text:p>
      <text:p text:style-name="Common_Body">Emoji-Test: Hinweis: kann je nach Font fehlen</text:p>
      <text:h text:outline-level="2" text:style-name="Common_H2">10. Grosse Tabelle Regression</text:h>
      <table:table table:name="LargeRegressionTable">
        <table:table-column/>
        <table:table-column/>
        <table:table-column/>
        <table:table-column/>
        <table:table-column/>
        <table:table-column/>
        <table:table-row>
          <table:table-cell table:style-name="Common_CellHeader">
            <text:p>Nr</text:p>
          </table:table-cell>
          <table:table-cell table:style-name="Common_CellHeader">
            <text:p>Name</text:p>
          </table:table-cell>
          <table:table-cell table:style-name="Common_CellHeader">
            <text:p>Ort</text:p>
          </table:table-cell>
          <table:table-cell table:style-name="Common_CellHeader">
            <text:p>Menge</text:p>
          </table:table-cell>
          <table:table-cell table:style-name="Common_CellHeader">
            <text:p>Style-Test</text:p>
          </table:table-cell>
          <table:table-cell table:style-name="Common_CellHeader">
            <text:p>Notiz</text:p>
          </table:table-cell>
        </table:table-row>
        <table:table-row>
          <table:table-cell table:style-name="Common_CellPlain">
            <text:p>1</text:p>
          </table:table-cell>
          <table:table-cell table:style-name="Common_CellPlain">
            <text:p>Kunde 001</text:p>
          </table:table-cell>
          <table:table-cell table:style-name="Common_CellPlain">
            <text:p>Ort 001</text:p>
          </table:table-cell>
          <table:table-cell table:style-name="Common_CellPlain">
            <text:p>3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</text:p>
          </table:table-cell>
          <table:table-cell table:style-name="Common_CellPlain">
            <text:p>Kunde 002</text:p>
          </table:table-cell>
          <table:table-cell table:style-name="Common_CellPlain">
            <text:p>Ort 002</text:p>
          </table:table-cell>
          <table:table-cell table:style-name="Common_CellPlain">
            <text:p>6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</text:p>
          </table:table-cell>
          <table:table-cell table:style-name="Common_CellPlain">
            <text:p>Kunde 003</text:p>
          </table:table-cell>
          <table:table-cell table:style-name="Common_CellPlain">
            <text:p>Ort 003</text:p>
          </table:table-cell>
          <table:table-cell table:style-name="Common_CellPlain">
            <text:p>9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</text:p>
          </table:table-cell>
          <table:table-cell table:style-name="Common_CellPlain">
            <text:p>Kunde 004</text:p>
          </table:table-cell>
          <table:table-cell table:style-name="Common_CellPlain">
            <text:p>Ort 004</text:p>
          </table:table-cell>
          <table:table-cell table:style-name="Common_CellPlain">
            <text:p>12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</text:p>
          </table:table-cell>
          <table:table-cell table:style-name="Common_CellPlain">
            <text:p>Kunde 005</text:p>
          </table:table-cell>
          <table:table-cell table:style-name="Common_CellPlain">
            <text:p>Ort 005</text:p>
          </table:table-cell>
          <table:table-cell table:style-name="Common_CellPlain">
            <text:p>15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6</text:p>
          </table:table-cell>
          <table:table-cell table:style-name="Common_CellPlain">
            <text:p>Kunde 006</text:p>
          </table:table-cell>
          <table:table-cell table:style-name="Common_CellPlain">
            <text:p>Ort 006</text:p>
          </table:table-cell>
          <table:table-cell table:style-name="Common_CellPlain">
            <text:p>18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7</text:p>
          </table:table-cell>
          <table:table-cell table:style-name="Common_CellPlain">
            <text:p>Kunde 007</text:p>
          </table:table-cell>
          <table:table-cell table:style-name="Common_CellPlain">
            <text:p>Ort 007</text:p>
          </table:table-cell>
          <table:table-cell table:style-name="Common_CellPlain">
            <text:p>21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8</text:p>
          </table:table-cell>
          <table:table-cell table:style-name="Common_CellPlain">
            <text:p>Kunde 008</text:p>
          </table:table-cell>
          <table:table-cell table:style-name="Common_CellPlain">
            <text:p>Ort 008</text:p>
          </table:table-cell>
          <table:table-cell table:style-name="Common_CellPlain">
            <text:p>24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9</text:p>
          </table:table-cell>
          <table:table-cell table:style-name="Common_CellPlain">
            <text:p>Kunde 009</text:p>
          </table:table-cell>
          <table:table-cell table:style-name="Common_CellPlain">
            <text:p>Ort 009</text:p>
          </table:table-cell>
          <table:table-cell table:style-name="Common_CellPlain">
            <text:p>27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0</text:p>
          </table:table-cell>
          <table:table-cell table:style-name="Common_CellPlain">
            <text:p>Kunde 010</text:p>
          </table:table-cell>
          <table:table-cell table:style-name="Common_CellPlain">
            <text:p>Ort 010</text:p>
          </table:table-cell>
          <table:table-cell table:style-name="Common_CellPlain">
            <text:p>30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1</text:p>
          </table:table-cell>
          <table:table-cell table:style-name="Common_CellPlain">
            <text:p>Kunde 011</text:p>
          </table:table-cell>
          <table:table-cell table:style-name="Common_CellPlain">
            <text:p>Ort 011</text:p>
          </table:table-cell>
          <table:table-cell table:style-name="Common_CellPlain">
            <text:p>33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2</text:p>
          </table:table-cell>
          <table:table-cell table:style-name="Common_CellPlain">
            <text:p>Kunde 012</text:p>
          </table:table-cell>
          <table:table-cell table:style-name="Common_CellPlain">
            <text:p>Ort 012</text:p>
          </table:table-cell>
          <table:table-cell table:style-name="Common_CellPlain">
            <text:p>36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3</text:p>
          </table:table-cell>
          <table:table-cell table:style-name="Common_CellPlain">
            <text:p>Kunde 013</text:p>
          </table:table-cell>
          <table:table-cell table:style-name="Common_CellPlain">
            <text:p>Ort 013</text:p>
          </table:table-cell>
          <table:table-cell table:style-name="Common_CellPlain">
            <text:p>39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4</text:p>
          </table:table-cell>
          <table:table-cell table:style-name="Common_CellPlain">
            <text:p>Kunde 014</text:p>
          </table:table-cell>
          <table:table-cell table:style-name="Common_CellPlain">
            <text:p>Ort 014</text:p>
          </table:table-cell>
          <table:table-cell table:style-name="Common_CellPlain">
            <text:p>42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5</text:p>
          </table:table-cell>
          <table:table-cell table:style-name="Common_CellPlain">
            <text:p>Kunde 015</text:p>
          </table:table-cell>
          <table:table-cell table:style-name="Common_CellPlain">
            <text:p>Ort 015</text:p>
          </table:table-cell>
          <table:table-cell table:style-name="Common_CellPlain">
            <text:p>45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6</text:p>
          </table:table-cell>
          <table:table-cell table:style-name="Common_CellPlain">
            <text:p>Kunde 016</text:p>
          </table:table-cell>
          <table:table-cell table:style-name="Common_CellPlain">
            <text:p>Ort 016</text:p>
          </table:table-cell>
          <table:table-cell table:style-name="Common_CellPlain">
            <text:p>48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7</text:p>
          </table:table-cell>
          <table:table-cell table:style-name="Common_CellPlain">
            <text:p>Kunde 017</text:p>
          </table:table-cell>
          <table:table-cell table:style-name="Common_CellPlain">
            <text:p>Ort 017</text:p>
          </table:table-cell>
          <table:table-cell table:style-name="Common_CellPlain">
            <text:p>51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8</text:p>
          </table:table-cell>
          <table:table-cell table:style-name="Common_CellPlain">
            <text:p>Kunde 018</text:p>
          </table:table-cell>
          <table:table-cell table:style-name="Common_CellPlain">
            <text:p>Ort 018</text:p>
          </table:table-cell>
          <table:table-cell table:style-name="Common_CellPlain">
            <text:p>54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19</text:p>
          </table:table-cell>
          <table:table-cell table:style-name="Common_CellPlain">
            <text:p>Kunde 019</text:p>
          </table:table-cell>
          <table:table-cell table:style-name="Common_CellPlain">
            <text:p>Ort 019</text:p>
          </table:table-cell>
          <table:table-cell table:style-name="Common_CellPlain">
            <text:p>57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0</text:p>
          </table:table-cell>
          <table:table-cell table:style-name="Common_CellPlain">
            <text:p>Kunde 020</text:p>
          </table:table-cell>
          <table:table-cell table:style-name="Common_CellPlain">
            <text:p>Ort 020</text:p>
          </table:table-cell>
          <table:table-cell table:style-name="Common_CellPlain">
            <text:p>60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1</text:p>
          </table:table-cell>
          <table:table-cell table:style-name="Common_CellPlain">
            <text:p>Kunde 021</text:p>
          </table:table-cell>
          <table:table-cell table:style-name="Common_CellPlain">
            <text:p>Ort 021</text:p>
          </table:table-cell>
          <table:table-cell table:style-name="Common_CellPlain">
            <text:p>63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2</text:p>
          </table:table-cell>
          <table:table-cell table:style-name="Common_CellPlain">
            <text:p>Kunde 022</text:p>
          </table:table-cell>
          <table:table-cell table:style-name="Common_CellPlain">
            <text:p>Ort 022</text:p>
          </table:table-cell>
          <table:table-cell table:style-name="Common_CellPlain">
            <text:p>66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3</text:p>
          </table:table-cell>
          <table:table-cell table:style-name="Common_CellPlain">
            <text:p>Kunde 023</text:p>
          </table:table-cell>
          <table:table-cell table:style-name="Common_CellPlain">
            <text:p>Ort 023</text:p>
          </table:table-cell>
          <table:table-cell table:style-name="Common_CellPlain">
            <text:p>69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4</text:p>
          </table:table-cell>
          <table:table-cell table:style-name="Common_CellPlain">
            <text:p>Kunde 024</text:p>
          </table:table-cell>
          <table:table-cell table:style-name="Common_CellPlain">
            <text:p>Ort 024</text:p>
          </table:table-cell>
          <table:table-cell table:style-name="Common_CellPlain">
            <text:p>72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5</text:p>
          </table:table-cell>
          <table:table-cell table:style-name="Common_CellPlain">
            <text:p>Kunde 025</text:p>
          </table:table-cell>
          <table:table-cell table:style-name="Common_CellPlain">
            <text:p>Ort 025</text:p>
          </table:table-cell>
          <table:table-cell table:style-name="Common_CellPlain">
            <text:p>75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6</text:p>
          </table:table-cell>
          <table:table-cell table:style-name="Common_CellPlain">
            <text:p>Kunde 026</text:p>
          </table:table-cell>
          <table:table-cell table:style-name="Common_CellPlain">
            <text:p>Ort 026</text:p>
          </table:table-cell>
          <table:table-cell table:style-name="Common_CellPlain">
            <text:p>78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7</text:p>
          </table:table-cell>
          <table:table-cell table:style-name="Common_CellPlain">
            <text:p>Kunde 027</text:p>
          </table:table-cell>
          <table:table-cell table:style-name="Common_CellPlain">
            <text:p>Ort 027</text:p>
          </table:table-cell>
          <table:table-cell table:style-name="Common_CellPlain">
            <text:p>81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8</text:p>
          </table:table-cell>
          <table:table-cell table:style-name="Common_CellPlain">
            <text:p>Kunde 028</text:p>
          </table:table-cell>
          <table:table-cell table:style-name="Common_CellPlain">
            <text:p>Ort 028</text:p>
          </table:table-cell>
          <table:table-cell table:style-name="Common_CellPlain">
            <text:p>84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29</text:p>
          </table:table-cell>
          <table:table-cell table:style-name="Common_CellPlain">
            <text:p>Kunde 029</text:p>
          </table:table-cell>
          <table:table-cell table:style-name="Common_CellPlain">
            <text:p>Ort 029</text:p>
          </table:table-cell>
          <table:table-cell table:style-name="Common_CellPlain">
            <text:p>87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0</text:p>
          </table:table-cell>
          <table:table-cell table:style-name="Common_CellPlain">
            <text:p>Kunde 030</text:p>
          </table:table-cell>
          <table:table-cell table:style-name="Common_CellPlain">
            <text:p>Ort 030</text:p>
          </table:table-cell>
          <table:table-cell table:style-name="Common_CellPlain">
            <text:p>90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1</text:p>
          </table:table-cell>
          <table:table-cell table:style-name="Common_CellPlain">
            <text:p>Kunde 031</text:p>
          </table:table-cell>
          <table:table-cell table:style-name="Common_CellPlain">
            <text:p>Ort 031</text:p>
          </table:table-cell>
          <table:table-cell table:style-name="Common_CellPlain">
            <text:p>93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2</text:p>
          </table:table-cell>
          <table:table-cell table:style-name="Common_CellPlain">
            <text:p>Kunde 032</text:p>
          </table:table-cell>
          <table:table-cell table:style-name="Common_CellPlain">
            <text:p>Ort 032</text:p>
          </table:table-cell>
          <table:table-cell table:style-name="Common_CellPlain">
            <text:p>96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3</text:p>
          </table:table-cell>
          <table:table-cell table:style-name="Common_CellPlain">
            <text:p>Kunde 033</text:p>
          </table:table-cell>
          <table:table-cell table:style-name="Common_CellPlain">
            <text:p>Ort 033</text:p>
          </table:table-cell>
          <table:table-cell table:style-name="Common_CellPlain">
            <text:p>99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4</text:p>
          </table:table-cell>
          <table:table-cell table:style-name="Common_CellPlain">
            <text:p>Kunde 034</text:p>
          </table:table-cell>
          <table:table-cell table:style-name="Common_CellPlain">
            <text:p>Ort 034</text:p>
          </table:table-cell>
          <table:table-cell table:style-name="Common_CellPlain">
            <text:p>102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5</text:p>
          </table:table-cell>
          <table:table-cell table:style-name="Common_CellPlain">
            <text:p>Kunde 035</text:p>
          </table:table-cell>
          <table:table-cell table:style-name="Common_CellPlain">
            <text:p>Ort 035</text:p>
          </table:table-cell>
          <table:table-cell table:style-name="Common_CellPlain">
            <text:p>105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6</text:p>
          </table:table-cell>
          <table:table-cell table:style-name="Common_CellPlain">
            <text:p>Kunde 036</text:p>
          </table:table-cell>
          <table:table-cell table:style-name="Common_CellPlain">
            <text:p>Ort 036</text:p>
          </table:table-cell>
          <table:table-cell table:style-name="Common_CellPlain">
            <text:p>108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7</text:p>
          </table:table-cell>
          <table:table-cell table:style-name="Common_CellPlain">
            <text:p>Kunde 037</text:p>
          </table:table-cell>
          <table:table-cell table:style-name="Common_CellPlain">
            <text:p>Ort 037</text:p>
          </table:table-cell>
          <table:table-cell table:style-name="Common_CellPlain">
            <text:p>111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8</text:p>
          </table:table-cell>
          <table:table-cell table:style-name="Common_CellPlain">
            <text:p>Kunde 038</text:p>
          </table:table-cell>
          <table:table-cell table:style-name="Common_CellPlain">
            <text:p>Ort 038</text:p>
          </table:table-cell>
          <table:table-cell table:style-name="Common_CellPlain">
            <text:p>114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39</text:p>
          </table:table-cell>
          <table:table-cell table:style-name="Common_CellPlain">
            <text:p>Kunde 039</text:p>
          </table:table-cell>
          <table:table-cell table:style-name="Common_CellPlain">
            <text:p>Ort 039</text:p>
          </table:table-cell>
          <table:table-cell table:style-name="Common_CellPlain">
            <text:p>117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0</text:p>
          </table:table-cell>
          <table:table-cell table:style-name="Common_CellPlain">
            <text:p>Kunde 040</text:p>
          </table:table-cell>
          <table:table-cell table:style-name="Common_CellPlain">
            <text:p>Ort 040</text:p>
          </table:table-cell>
          <table:table-cell table:style-name="Common_CellPlain">
            <text:p>120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1</text:p>
          </table:table-cell>
          <table:table-cell table:style-name="Common_CellPlain">
            <text:p>Kunde 041</text:p>
          </table:table-cell>
          <table:table-cell table:style-name="Common_CellPlain">
            <text:p>Ort 041</text:p>
          </table:table-cell>
          <table:table-cell table:style-name="Common_CellPlain">
            <text:p>123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2</text:p>
          </table:table-cell>
          <table:table-cell table:style-name="Common_CellPlain">
            <text:p>Kunde 042</text:p>
          </table:table-cell>
          <table:table-cell table:style-name="Common_CellPlain">
            <text:p>Ort 042</text:p>
          </table:table-cell>
          <table:table-cell table:style-name="Common_CellPlain">
            <text:p>126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3</text:p>
          </table:table-cell>
          <table:table-cell table:style-name="Common_CellPlain">
            <text:p>Kunde 043</text:p>
          </table:table-cell>
          <table:table-cell table:style-name="Common_CellPlain">
            <text:p>Ort 043</text:p>
          </table:table-cell>
          <table:table-cell table:style-name="Common_CellPlain">
            <text:p>129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4</text:p>
          </table:table-cell>
          <table:table-cell table:style-name="Common_CellPlain">
            <text:p>Kunde 044</text:p>
          </table:table-cell>
          <table:table-cell table:style-name="Common_CellPlain">
            <text:p>Ort 044</text:p>
          </table:table-cell>
          <table:table-cell table:style-name="Common_CellPlain">
            <text:p>132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5</text:p>
          </table:table-cell>
          <table:table-cell table:style-name="Common_CellPlain">
            <text:p>Kunde 045</text:p>
          </table:table-cell>
          <table:table-cell table:style-name="Common_CellPlain">
            <text:p>Ort 045</text:p>
          </table:table-cell>
          <table:table-cell table:style-name="Common_CellPlain">
            <text:p>135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6</text:p>
          </table:table-cell>
          <table:table-cell table:style-name="Common_CellPlain">
            <text:p>Kunde 046</text:p>
          </table:table-cell>
          <table:table-cell table:style-name="Common_CellPlain">
            <text:p>Ort 046</text:p>
          </table:table-cell>
          <table:table-cell table:style-name="Common_CellPlain">
            <text:p>138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7</text:p>
          </table:table-cell>
          <table:table-cell table:style-name="Common_CellPlain">
            <text:p>Kunde 047</text:p>
          </table:table-cell>
          <table:table-cell table:style-name="Common_CellPlain">
            <text:p>Ort 047</text:p>
          </table:table-cell>
          <table:table-cell table:style-name="Common_CellPlain">
            <text:p>141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8</text:p>
          </table:table-cell>
          <table:table-cell table:style-name="Common_CellPlain">
            <text:p>Kunde 048</text:p>
          </table:table-cell>
          <table:table-cell table:style-name="Common_CellPlain">
            <text:p>Ort 048</text:p>
          </table:table-cell>
          <table:table-cell table:style-name="Common_CellPlain">
            <text:p>144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49</text:p>
          </table:table-cell>
          <table:table-cell table:style-name="Common_CellPlain">
            <text:p>Kunde 049</text:p>
          </table:table-cell>
          <table:table-cell table:style-name="Common_CellPlain">
            <text:p>Ort 049</text:p>
          </table:table-cell>
          <table:table-cell table:style-name="Common_CellPlain">
            <text:p>147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0</text:p>
          </table:table-cell>
          <table:table-cell table:style-name="Common_CellPlain">
            <text:p>Kunde 050</text:p>
          </table:table-cell>
          <table:table-cell table:style-name="Common_CellPlain">
            <text:p>Ort 050</text:p>
          </table:table-cell>
          <table:table-cell table:style-name="Common_CellPlain">
            <text:p>150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1</text:p>
          </table:table-cell>
          <table:table-cell table:style-name="Common_CellPlain">
            <text:p>Kunde 051</text:p>
          </table:table-cell>
          <table:table-cell table:style-name="Common_CellPlain">
            <text:p>Ort 051</text:p>
          </table:table-cell>
          <table:table-cell table:style-name="Common_CellPlain">
            <text:p>153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2</text:p>
          </table:table-cell>
          <table:table-cell table:style-name="Common_CellPlain">
            <text:p>Kunde 052</text:p>
          </table:table-cell>
          <table:table-cell table:style-name="Common_CellPlain">
            <text:p>Ort 052</text:p>
          </table:table-cell>
          <table:table-cell table:style-name="Common_CellPlain">
            <text:p>156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3</text:p>
          </table:table-cell>
          <table:table-cell table:style-name="Common_CellPlain">
            <text:p>Kunde 053</text:p>
          </table:table-cell>
          <table:table-cell table:style-name="Common_CellPlain">
            <text:p>Ort 053</text:p>
          </table:table-cell>
          <table:table-cell table:style-name="Common_CellPlain">
            <text:p>159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4</text:p>
          </table:table-cell>
          <table:table-cell table:style-name="Common_CellPlain">
            <text:p>Kunde 054</text:p>
          </table:table-cell>
          <table:table-cell table:style-name="Common_CellPlain">
            <text:p>Ort 054</text:p>
          </table:table-cell>
          <table:table-cell table:style-name="Common_CellPlain">
            <text:p>162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5</text:p>
          </table:table-cell>
          <table:table-cell table:style-name="Common_CellPlain">
            <text:p>Kunde 055</text:p>
          </table:table-cell>
          <table:table-cell table:style-name="Common_CellPlain">
            <text:p>Ort 055</text:p>
          </table:table-cell>
          <table:table-cell table:style-name="Common_CellPlain">
            <text:p>165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6</text:p>
          </table:table-cell>
          <table:table-cell table:style-name="Common_CellPlain">
            <text:p>Kunde 056</text:p>
          </table:table-cell>
          <table:table-cell table:style-name="Common_CellPlain">
            <text:p>Ort 056</text:p>
          </table:table-cell>
          <table:table-cell table:style-name="Common_CellPlain">
            <text:p>168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7</text:p>
          </table:table-cell>
          <table:table-cell table:style-name="Common_CellPlain">
            <text:p>Kunde 057</text:p>
          </table:table-cell>
          <table:table-cell table:style-name="Common_CellPlain">
            <text:p>Ort 057</text:p>
          </table:table-cell>
          <table:table-cell table:style-name="Common_CellPlain">
            <text:p>171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8</text:p>
          </table:table-cell>
          <table:table-cell table:style-name="Common_CellPlain">
            <text:p>Kunde 058</text:p>
          </table:table-cell>
          <table:table-cell table:style-name="Common_CellPlain">
            <text:p>Ort 058</text:p>
          </table:table-cell>
          <table:table-cell table:style-name="Common_CellPlain">
            <text:p>174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59</text:p>
          </table:table-cell>
          <table:table-cell table:style-name="Common_CellPlain">
            <text:p>Kunde 059</text:p>
          </table:table-cell>
          <table:table-cell table:style-name="Common_CellPlain">
            <text:p>Ort 059</text:p>
          </table:table-cell>
          <table:table-cell table:style-name="Common_CellPlain">
            <text:p>177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  <table:table-row>
          <table:table-cell table:style-name="Common_CellPlain">
            <text:p>60</text:p>
          </table:table-cell>
          <table:table-cell table:style-name="Common_CellPlain">
            <text:p>Kunde 060</text:p>
          </table:table-cell>
          <table:table-cell table:style-name="Common_CellPlain">
            <text:p>Ort 060</text:p>
          </table:table-cell>
          <table:table-cell table:style-name="Common_CellPlain">
            <text:p>180</text:p>
          </table:table-cell>
          <table:table-cell table:style-name="Common_CellPlain">
            <text:p><text:span text:style-name="Common_Bold">B</text:span> / <text:span text:style-name="Common_Italic">I</text:span> / <text:span text:style-name="AutoT_GreenBold">A</text:span></text:p>
          </table:table-cell>
          <table:table-cell table:style-name="Common_CellPlain">
            <text:p>Regression fuer Tabellenexport</text:p>
          </table:table-cell>
        </table:table-row>
      </table:table>
      <text:h text:outline-level="2" text:style-name="Common_H2">11. Erwartete Parser-/IR-Ziele</text:h>
      <text:p text:style-name="Common_Code">Erwartete Lib-Funktionen:<text:line-break/>- ZIP lesen und manifest.xml auswerten<text:line-break/>- content.xml und styles.xml laden<text:line-break/>- STYLE-REGISTRY mit source={styles.xml|content.xml/automatic-styles}<text:line-break/>- text:p, text:h, text:span, text:a, text:line-break<text:line-break/>- text:list, text:list-item, verschachtelte Listen<text:line-break/>- table:table, table:table-row, table:table-cell<text:line-break/>- draw:frame, draw:image, draw:text-box<text:line-break/>- UTF-8 stabil erhalten<text:line-break/>- ODT -&gt; IR -&gt; ODT Roundtrip ohne Absturz</text:p>
      <text:h text:outline-level="2" text:style-name="Common_H2">12. Fazit</text:h>
      <text:p text:style-name="Common_Body">Diese Datei ist als Volltest/Regressionstest fuer eine ODT-Lib gedacht.</text:p>
      <text:p text:style-name="Common_Body">Sie kombiniert die bisherigen Testdateien: Basisstruktur, Style-Aufloesung, automatic-styles, Tabellen, Bilder und IR-relevante Sonderfaell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xlink="http://www.w3.org/1999/xlink" xmlns:draw="urn:oasis:names:tc:opendocument:xmlns:drawing:1.0" xmlns:svg="urn:oasis:names:tc:opendocument:xmlns:svg-compatible:1.0" xmlns:manifest="urn:oasis:names:tc:opendocument:xmlns:manifest:1.0" office:version="1.2">
  <office:styles>
    <style:style style:name="Common_Title" style:family="paragraph" style:display-name="Common_Title">
      <style:text-properties fo:font-size="24pt" fo:font-weight="bold" fo:color="#222222"/>
      <style:paragraph-properties fo:margin-bottom="0.35cm"/>
    </style:style>
    <style:style style:name="Common_H2" style:family="paragraph" style:display-name="Common_H2">
      <style:text-properties fo:font-size="16pt" fo:font-weight="bold" fo:color="#003366"/>
      <style:paragraph-properties fo:margin-bottom="0.15cm" fo:margin-top="0.25cm"/>
    </style:style>
    <style:style style:name="Common_Body" style:family="paragraph" style:display-name="Common_Body">
      <style:text-properties fo:font-size="11pt"/>
      <style:paragraph-properties fo:margin-bottom="0.12cm"/>
    </style:style>
    <style:style style:name="Common_Code" style:family="paragraph" style:display-name="Common_Code">
      <style:text-properties fo:font-family="Courier New" fo:font-size="9pt"/>
      <style:paragraph-properties fo:background-color="#F2F2F2" fo:margin-left="0.4cm" fo:margin-right="0.4cm" fo:padding="0.15cm"/>
    </style:style>
    <style:style style:name="Common_Quote" style:family="paragraph" style:display-name="Common_Quote">
      <style:text-properties fo:font-style="italic"/>
      <style:paragraph-properties fo:margin-left="0.8cm" fo:margin-right="0.8cm" fo:background-color="#FFF8DD" fo:padding="0.18cm"/>
    </style:style>
    <style:style style:name="Common_Bold" style:family="text" style:display-name="Common_Bold">
      <style:text-properties fo:font-weight="bold"/>
    </style:style>
    <style:style style:name="Common_Italic" style:family="text" style:display-name="Common_Italic">
      <style:text-properties fo:font-style="italic"/>
    </style:style>
    <style:style style:name="Common_Mono" style:family="text" style:display-name="Common_Mono">
      <style:text-properties fo:font-family="Courier New" fo:font-size="10pt"/>
    </style:style>
    <style:style style:name="Common_Red" style:family="text" style:display-name="Common_Red">
      <style:text-properties fo:color="#AA0000"/>
    </style:style>
    <style:style style:name="Common_Blue" style:family="text" style:display-name="Common_Blue">
      <style:text-properties fo:color="#0044AA"/>
    </style:style>
    <style:style style:name="Common_Underline" style:family="text" style:display-name="Common_Underline">
      <style:text-properties style:text-underline-style="solid" style:text-underline-width="auto" style:text-underline-color="font-color"/>
    </style:style>
    <style:style style:name="Common_Strike" style:family="text" style:display-name="Common_Strike">
      <style:text-properties style:text-line-through-style="solid"/>
    </style:style>
    <style:style style:name="Common_Sub" style:family="text" style:display-name="Common_Sub">
      <style:text-properties style:text-position="sub 58%"/>
    </style:style>
    <style:style style:name="Common_Sup" style:family="text" style:display-name="Common_Sup">
      <style:text-properties style:text-position="super 58%"/>
    </style:style>
    <style:style style:name="Common_CellHeader" style:family="table-cell" style:display-name="Common_CellHeader">
      <style:table-cell-properties fo:background-color="#DDDDDD" fo:border="0.05pt solid #666666"/>
    </style:style>
    <style:style style:name="Common_CellPlain" style:family="table-cell" style:display-name="Common_CellPlain">
      <style:table-cell-properties fo:border="0.05pt solid #999999"/>
    </style:style>
    <style:style style:name="Common_ImageFrame" style:family="graphic" style:display-name="Common_ImageFrame">
      <style:graphic-properties fo:border="0.05pt solid #003366" fo:padding="0.0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xlink="http://www.w3.org/1999/xlink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