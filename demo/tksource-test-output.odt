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tkimg1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office:version="1.2">
  <office:automatic-styles/>
  <office:body>
    <office:text>
      <text:h text:outline-level="1" text:style-name="Heading_1">Widget-Export</text:h>
      <text:p>Ein <text:span text:style-name="Bold">fett</text:span> und <text:span text:style-name="Italic">kursiv</text:span> Absatz mit <text:span text:style-name="Mono">code()</text:span>.</text:p>
      <text:h text:outline-level="2" text:style-name="Heading_2">Code</text:h>
      <text:p text:style-name="Code">zeile1<text:line-break/>zeile2</text:p>
      <text:p><draw:frame draw:name="img" text:anchor-type="as-char" svg:width="0.847cm" svg:height="0.423cm"><draw:image xlink:href="Pictures/tkimg1.png" xlink:type="simple" xlink:show="embed" xlink:actuate="onLoad"/></draw:frame></text:p>
      <text:p>Schl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Heading_1" style:family="paragraph">
      <style:text-properties fo:font-weight="bold" fo:font-size="24pt"/>
    </style:style>
    <style:style style:name="Heading_2" style:family="paragraph">
      <style:text-properties fo:font-weight="bold" fo:font-size="18pt"/>
    </style:style>
    <style:style style:name="Heading_3" style:family="paragraph">
      <style:text-properties fo:font-weight="bold" fo:font-size="16pt"/>
    </style:style>
    <style:style style:name="Heading_4" style:family="paragraph">
      <style:text-properties fo:font-weight="bold" fo:font-size="14pt"/>
    </style:style>
    <style:style style:name="Heading_5" style:family="paragraph">
      <style:text-properties fo:font-weight="bold" fo:font-size="12pt"/>
    </style:style>
    <style:style style:name="Heading_6" style:family="paragraph">
      <style:text-properties fo:font-weight="bold" fo:font-size="11pt"/>
    </style:style>
    <style:style style:name="Code" style:family="paragraph">
      <style:text-properties fo:font-family="Courier New" fo:font-size="10pt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Mono" style:family="text">
      <style:text-properties fo:font-family="Courier New"/>
    </style:style>
    <style:style style:name="Underline" style:family="text">
      <style:text-properties style:text-underline-style="solid"/>
    </style:style>
    <style:style style:name="Strike" style:family="text">
      <style:text-properties style:text-line-through-style="solid"/>
    </style:style>
  </office:styles>
</office:document-styles>
</file>