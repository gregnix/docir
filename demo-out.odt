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Pictures/demo.png" manifest:media-type="image/png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xlink="http://www.w3.org/1999/xlink" office:version="1.2">
  <office:automatic-styles/>
  <office:body>
    <office:text>
      <text:h text:outline-level="1" text:style-name="Heading_1">docir::odt Demo</text:h>
      <text:p>Ein Absatz mit <text:span text:style-name="Bold">fett</text:span>, <text:span text:style-name="Italic">kursiv</text:span>, <text:span text:style-name="Mono">Code</text:span> und einem <text:a xlink:type="simple" xlink:href="https://www.tcl.tk/">Link</text:a>.</text:p>
      <text:h text:outline-level="2" text:style-name="Heading_2">Liste</text:h>
      <text:list text:style-name="L1">
        <text:list-item>
          <text:p>Eintrag A</text:p>
        </text:list-item>
        <text:list-item>
          <text:p>Eintrag B</text:p>
        </text:list-item>
        <text:list-item>
          <text:p>Eintrag C</text:p>
        </text:list-item>
      </text:list>
      <text:h text:outline-level="2" text:style-name="Heading_2">Tabelle</text:h>
      <table:table table:name="Table">
        <table:table-column table:number-columns-repeated="3"/>
        <table:table-header-rows>
          <table:table-row>
            <table:table-cell office:value-type="string">
              <text:p>Modul</text:p>
            </table:table-cell>
            <table:table-cell office:value-type="string">
              <text:p>Rolle</text:p>
            </table:table-cell>
            <table:table-cell office:value-type="string">
              <text:p>Notiz</text:p>
            </table:table-cell>
          </table:table-row>
        </table:table-header-rows>
        <table:table-row>
          <table:table-cell office:value-type="string">
            <text:p>docir::odt</text:p>
          </table:table-cell>
          <table:table-cell office:value-type="string">
            <text:p>Senke</text:p>
          </table:table-cell>
          <table:table-cell office:value-type="string">
            <text:p>DocIR nach ODT</text:p>
          </table:table-cell>
        </table:table-row>
        <table:table-row>
          <table:table-cell office:value-type="string">
            <text:p>docir::odtSource</text:p>
          </table:table-cell>
          <table:table-cell office:value-type="string">
            <text:p>Quelle</text:p>
          </table:table-cell>
          <table:table-cell office:value-type="string">
            <text:p>ODT nach DocIR</text:p>
          </table:table-cell>
        </table:table-row>
      </table:table>
      <text:h text:outline-level="2" text:style-name="Heading_2">Codeblock</text:h>
      <text:p text:style-name="Code">package require docir::odt<text:line-break/>docir::odt::write $ir out.odt</text:p>
      <text:h text:outline-level="2" text:style-name="Heading_2">Bild</text:h>
      <text:p><draw:frame draw:name="img" text:anchor-type="as-char" svg:width="1.270cm" svg:height="0.635cm"><draw:image xlink:href="Pictures/demo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Heading_1" style:family="paragraph">
      <style:text-properties fo:font-weight="bold" fo:font-size="24pt"/>
    </style:style>
    <style:style style:name="Heading_2" style:family="paragraph">
      <style:text-properties fo:font-weight="bold" fo:font-size="18pt"/>
    </style:style>
    <style:style style:name="Heading_3" style:family="paragraph">
      <style:text-properties fo:font-weight="bold" fo:font-size="16pt"/>
    </style:style>
    <style:style style:name="Heading_4" style:family="paragraph">
      <style:text-properties fo:font-weight="bold" fo:font-size="14pt"/>
    </style:style>
    <style:style style:name="Heading_5" style:family="paragraph">
      <style:text-properties fo:font-weight="bold" fo:font-size="12pt"/>
    </style:style>
    <style:style style:name="Heading_6" style:family="paragraph">
      <style:text-properties fo:font-weight="bold" fo:font-size="11pt"/>
    </style:style>
    <style:style style:name="Code" style:family="paragraph">
      <style:text-properties fo:font-family="Courier New" fo:font-size="10pt"/>
    </style:style>
    <style:style style:name="Bold" style:family="text">
      <style:text-properties fo:font-weight="bold"/>
    </style:style>
    <style:style style:name="Italic" style:family="text">
      <style:text-properties fo:font-style="italic"/>
    </style:style>
    <style:style style:name="Mono" style:family="text">
      <style:text-properties fo:font-family="Courier New"/>
    </style:style>
    <style:style style:name="Underline" style:family="text">
      <style:text-properties style:text-underline-style="solid"/>
    </style:style>
    <style:style style:name="Strike" style:family="text">
      <style:text-properties style:text-line-through-style="solid"/>
    </style:style>
  </office:styles>
</office:document-styles>
</file>